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5000002CB4B5A1CED.png" manifest:media-type="image/png"/>
  <manifest:file-entry manifest:full-path="Pictures/100000010000041B000003717F2743A1.png" manifest:media-type="image/png"/>
  <manifest:file-entry manifest:full-path="Pictures/100000010000041B0000037190F5850E.png" manifest:media-type="image/png"/>
  <manifest:file-entry manifest:full-path="Pictures/100000010000041B000003712723123A.png" manifest:media-type="image/png"/>
  <manifest:file-entry manifest:full-path="Pictures/1000000100000415000002F1D6603B64.png" manifest:media-type="image/png"/>
  <manifest:file-entry manifest:full-path="Pictures/100000010000062100000378379D8953.png" manifest:media-type="image/png"/>
  <manifest:file-entry manifest:full-path="Pictures/1000000100000415000002F1A339EF86.png" manifest:media-type="image/png"/>
  <manifest:file-entry manifest:full-path="Pictures/1000000100000415000002F16E6994B6.png" manifest:media-type="image/png"/>
  <manifest:file-entry manifest:full-path="Pictures/10000001000006210000037861B3A8D9.png" manifest:media-type="image/png"/>
  <manifest:file-entry manifest:full-path="Pictures/100000010000018F000001B3B65A6971.png" manifest:media-type="image/png"/>
  <manifest:file-entry manifest:full-path="Pictures/1000000100000415000002F19DC6474E.png" manifest:media-type="image/png"/>
  <manifest:file-entry manifest:full-path="Pictures/10000001000001E7000001F91B790821.png" manifest:media-type="image/png"/>
  <manifest:file-entry manifest:full-path="Pictures/100000010000033900000069E335D2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4e4" officeooo:paragraph-rsid="000774e4"/>
    </style:style>
    <style:style style:name="P2" style:family="paragraph" style:parent-style-name="Standard">
      <style:text-properties officeooo:rsid="0012d53e" officeooo:paragraph-rsid="0012d53e"/>
    </style:style>
    <style:style style:name="P3" style:family="paragraph" style:parent-style-name="Standard">
      <style:text-properties officeooo:rsid="000acdb1" officeooo:paragraph-rsid="000acdb1"/>
    </style:style>
    <style:style style:name="P4" style:family="paragraph" style:parent-style-name="Standard">
      <style:paragraph-properties fo:break-before="page"/>
      <style:text-properties officeooo:rsid="000b4e68" officeooo:paragraph-rsid="000b4e68"/>
    </style:style>
    <style:style style:name="P5" style:family="paragraph" style:parent-style-name="Standard">
      <style:text-properties officeooo:rsid="000b4e68" officeooo:paragraph-rsid="000b4e68"/>
    </style:style>
    <style:style style:name="P6" style:family="paragraph" style:parent-style-name="Standard">
      <style:paragraph-properties fo:break-before="page"/>
      <style:text-properties officeooo:rsid="000e988d" officeooo:paragraph-rsid="000e988d"/>
    </style:style>
    <style:style style:name="P7" style:family="paragraph" style:parent-style-name="Standard">
      <style:text-properties officeooo:rsid="000e988d" officeooo:paragraph-rsid="000e988d"/>
    </style:style>
    <style:style style:name="P8" style:family="paragraph" style:parent-style-name="Standard">
      <style:paragraph-properties fo:break-before="page"/>
      <style:text-properties officeooo:rsid="001037de" officeooo:paragraph-rsid="001037de"/>
    </style:style>
    <style:style style:name="P9" style:family="paragraph" style:parent-style-name="Standard">
      <style:text-properties officeooo:rsid="001037de" officeooo:paragraph-rsid="001037de"/>
    </style:style>
    <style:style style:name="P10" style:family="paragraph" style:parent-style-name="Standard">
      <style:text-properties officeooo:rsid="0011ae1f" officeooo:paragraph-rsid="0011ae1f"/>
    </style:style>
    <style:style style:name="P11" style:family="paragraph" style:parent-style-name="Standard">
      <style:paragraph-properties fo:break-before="page"/>
      <style:text-properties officeooo:rsid="0011ae1f" officeooo:paragraph-rsid="0011ae1f"/>
    </style:style>
    <style:style style:name="fr1" style:family="graphic" style:parent-style-name="Graphics">
      <style:graphic-properties fo:margin-top="0.0783in" fo:margin-bottom="0.0783in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fo:margin-top="0.0783in" fo:margin-bottom="0.0783in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.0201in" fo:margin-bottom="0.0201in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7" style:family="graphic" style:parent-style-name="Graphics">
      <style:graphic-properties fo:margin-top="0.0402in" fo:margin-bottom="0.0402in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top="0.0201in" fo:margin-bottom="0.0201in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ink de Proyecto en GITHUB:</text:p>
      <text:p text:style-name="P2"><text:tab/>https://github.com/LuisAyala/api-gestion-pedidos.git</text:p>
      <text:p text:style-name="P1">Versión de JAVA utilizado:</text:p>
      <text:p text:style-name="P1"/>
      <text:p text:style-name="P3"><draw:frame draw:style-name="fr1" draw:name="Imagen1" text:anchor-type="char" svg:width="6.6929in" svg:height="0.8516in" draw:z-index="0"><draw:image xlink:href="Pictures/100000010000033900000069E335D260.png" xlink:type="simple" xlink:show="embed" xlink:actuate="onLoad" draw:mime-type="image/png"/></draw:frame>Creación de BD:</text:p>
      <text:p text:style-name="P3"><draw:frame draw:style-name="fr2" draw:name="Imagen2" text:anchor-type="char" svg:x="0.8098in" svg:y="0.1201in" svg:width="5.0701in" svg:height="3.2598in" draw:z-index="1"><draw:image xlink:href="Pictures/10000001000001E7000001F91B790821.png" xlink:type="simple" xlink:show="embed" xlink:actuate="onLoad" draw:mime-type="image/png"/></draw:frame><draw:frame draw:style-name="fr3" draw:name="Imagen3" text:anchor-type="char" svg:x="1.4146in" svg:y="5.048in" svg:width="3.6146in" svg:height="3.1346in" draw:z-index="2"><draw:image xlink:href="Pictures/100000010000018F000001B3B65A6971.png" xlink:type="simple" xlink:show="embed" xlink:actuate="onLoad" draw:mime-type="image/png"/></draw:frame></text:p>
      <text:p text:style-name="P3"/>
      <text:p text:style-name="P4">Registrar un Cliente:</text:p>
      <text:p text:style-name="P5"/>
      <text:p text:style-name="P5"><draw:frame draw:style-name="fr2" draw:name="Imagen4" text:anchor-type="char" svg:x="0in" svg:y="0.0618in" svg:width="6.6929in" svg:height="3.7874in" draw:z-index="3"><draw:image xlink:href="Pictures/10000001000006210000037861B3A8D9.png" xlink:type="simple" xlink:show="embed" xlink:actuate="onLoad" draw:mime-type="image/png"/></draw:frame></text:p>
      <text:p text:style-name="P5">Registrar Productos:</text:p>
      <text:p text:style-name="P5"/>
      <text:p text:style-name="P5"><draw:frame draw:style-name="fr3" draw:name="Imagen5" text:anchor-type="char" svg:x="-0.0311in" svg:y="0.061in" svg:width="6.6929in" svg:height="3.7874in" draw:z-index="4"><draw:image xlink:href="Pictures/100000010000062100000378379D8953.png" xlink:type="simple" xlink:show="embed" xlink:actuate="onLoad" draw:mime-type="image/png"/></draw:frame></text:p>
      <text:p text:style-name="P6">Otro producto:</text:p>
      <text:p text:style-name="P7"><draw:frame draw:style-name="fr4" draw:name="Imagen9" text:anchor-type="char" svg:x="0in" svg:y="0.1437in" svg:width="6.6929in" svg:height="4.822in" draw:z-index="6"><draw:image xlink:href="Pictures/1000000100000415000002F16E6994B6.png" xlink:type="simple" xlink:show="embed" xlink:actuate="onLoad" draw:mime-type="image/png"/></draw:frame></text:p>
      <text:p text:style-name="P7"/>
      <text:p text:style-name="P7"><draw:frame draw:style-name="fr5" draw:name="Imagen10" text:anchor-type="char" svg:width="6.6929in" svg:height="4.822in" draw:z-index="7"><draw:image xlink:href="Pictures/1000000100000415000002F19DC6474E.png" xlink:type="simple" xlink:show="embed" xlink:actuate="onLoad" draw:mime-type="image/png"/></draw:frame><text:soft-page-break/></text:p>
      <text:p text:style-name="P6">Listar un cliente:</text:p>
      <text:p text:style-name="P7"><draw:frame draw:style-name="fr6" draw:name="Imagen8" text:anchor-type="char" svg:width="6.6929in" svg:height="4.822in" draw:z-index="5"><draw:image xlink:href="Pictures/1000000100000415000002F1D6603B64.png" xlink:type="simple" xlink:show="embed" xlink:actuate="onLoad" draw:mime-type="image/png"/></draw:frame></text:p>
      <text:p text:style-name="P7"/>
      <text:p text:style-name="P5">Listar catalogo de productos:</text:p>
      <text:p text:style-name="P5"><draw:frame draw:style-name="fr7" draw:name="Imagen6" text:anchor-type="char" svg:x="0.1339in" svg:y="0.1827in" svg:width="5.7583in" svg:height="4.2362in" draw:z-index="8"><draw:image xlink:href="Pictures/1000000100000415000002F1A339EF86.png" xlink:type="simple" xlink:show="embed" xlink:actuate="onLoad" draw:mime-type="image/png"/></draw:frame></text:p>
      <text:p text:style-name="P5"><text:soft-page-break/></text:p>
      <text:p text:style-name="P5">Crear Pedido:</text:p>
      <text:p text:style-name="P5"><draw:frame draw:style-name="fr8" draw:name="Imagen7" text:anchor-type="char" svg:x="0.4492in" svg:y="0.1634in" svg:width="4.6902in" svg:height="4.6098in" draw:z-index="9"><draw:image xlink:href="Pictures/100000010000041B000003712723123A.png" xlink:type="simple" xlink:show="embed" xlink:actuate="onLoad" draw:mime-type="image/png"/></draw:frame></text:p>
      <text:p text:style-name="P5"><draw:frame draw:style-name="fr9" draw:name="Imagen11" text:anchor-type="char" svg:x="0.439in" svg:y="4.7043in" svg:width="5.6902in" svg:height="4.2098in" draw:z-index="10"><draw:image xlink:href="Pictures/100000010000041B0000037190F5850E.png" xlink:type="simple" xlink:show="embed" xlink:actuate="onLoad" draw:mime-type="image/png"/></draw:frame></text:p>
      <text:p text:style-name="P8">Consultar Pedido:</text:p>
      <text:p text:style-name="P9"><draw:frame draw:style-name="fr4" draw:name="Imagen12" text:anchor-type="char" svg:x="0in" svg:y="0.1228in" svg:width="6.6929in" svg:height="5.6102in" draw:z-index="11"><draw:image xlink:href="Pictures/100000010000041B000003717F2743A1.png" xlink:type="simple" xlink:show="embed" xlink:actuate="onLoad" draw:mime-type="image/png"/></draw:frame></text:p>
      <text:p text:style-name="P9"/>
      <text:p text:style-name="P10"/>
      <text:p text:style-name="P11">Consultar <text:s/>pedidos de un Cliente especifico:</text:p>
      <text:p text:style-name="P10"/>
      <text:p text:style-name="P10"><draw:frame draw:style-name="fr6" draw:name="Imagen13" text:anchor-type="char" svg:width="6.6929in" svg:height="5.8283in" draw:z-index="12"><draw:image xlink:href="Pictures/1000000100000335000002CB4B5A1CED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9:49:46.199259997</meta:creation-date>
    <meta:generator>LibreOffice/25.8.7.3$Linux_X86_64 LibreOffice_project/580$Build-3</meta:generator>
    <dc:date>2026-06-18T15:19:28.438927566</dc:date>
    <meta:editing-duration>PT8H27M56S</meta:editing-duration>
    <meta:editing-cycles>8</meta:editing-cycles>
    <meta:document-statistic meta:table-count="0" meta:image-count="13" meta:object-count="0" meta:page-count="9" meta:paragraph-count="12" meta:word-count="37" meta:character-count="297" meta:non-whitespace-character-count="270"/>
  </office:meta>
</office:document-meta>
</file>